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BB80000070834D9C2CB.png" manifest:media-type="image/png"/>
  <manifest:file-entry manifest:full-path="Pictures/1000000100000BB80000070857A65D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99cm" style:rel-column-width="1020*"/>
    </style:style>
    <style:style style:name="Таблица1.B" style:family="table-column">
      <style:table-column-properties style:column-width="3.704cm" style:rel-column-width="2100*"/>
    </style:style>
    <style:style style:name="Таблица1.C" style:family="table-column">
      <style:table-column-properties style:column-width="11.497cm" style:rel-column-width="6518*"/>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6.995cm" table:align="left"/>
    </style:style>
    <style:style style:name="Таблица2.A" style:family="table-column">
      <style:table-column-properties style:column-width="1.286cm"/>
    </style:style>
    <style:style style:name="Таблица2.B" style:family="table-column">
      <style:table-column-properties style:column-width="2.081cm"/>
    </style:style>
    <style:style style:name="Таблица2.C" style:family="table-column">
      <style:table-column-properties style:column-width="3.004cm"/>
    </style:style>
    <style:style style:name="Таблица2.D" style:family="table-column">
      <style:table-column-properties style:column-width="1.718cm"/>
    </style:style>
    <style:style style:name="Таблица2.E" style:family="table-column">
      <style:table-column-properties style:column-width="3.129cm"/>
    </style:style>
    <style:style style:name="Таблица2.F" style:family="table-column">
      <style:table-column-properties style:column-width="3.392cm"/>
    </style:style>
    <style:style style:name="Таблица2.G" style:family="table-column">
      <style:table-column-properties style:column-width="2.385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G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1.612cm" style:rel-column-width="914*"/>
    </style:style>
    <style:style style:name="Таблица3.B" style:family="table-column">
      <style:table-column-properties style:column-width="4.459cm" style:rel-column-width="2528*"/>
    </style:style>
    <style:style style:name="Таблица3.C" style:family="table-column">
      <style:table-column-properties style:column-width="10.929cm" style:rel-column-width="6196*"/>
    </style:style>
    <style:style style:name="Таблица3.A1" style:family="table-cell">
      <style:table-cell-properties fo:padding="0.097cm" fo:border-left="0.5pt solid #000000" fo:border-right="none" fo:border-top="0.5pt solid #000000" fo:border-bottom="0.5pt solid #000000"/>
    </style:style>
    <style:style style:name="Таблица3.C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C2" style:family="table-cell">
      <style:table-cell-properties fo:padding="0.097cm" fo:border-left="0.5pt solid #000000" fo:border-right="0.5pt solid #000000" fo:border-top="none" fo:border-bottom="0.5pt solid #000000"/>
    </style:style>
    <style:style style:name="Таблица3.4" style:family="table-row">
      <style:table-row-properties style:min-row-height="2.529cm"/>
    </style:style>
    <style:style style:name="P1" style:family="paragraph" style:parent-style-name="Standard">
      <style:paragraph-properties fo:margin-left="1.281cm" fo:margin-right="1.381cm" fo:margin-top="0cm" fo:margin-bottom="0.021cm" style:contextual-spacing="false" fo:line-height="112%" fo:text-align="center" style:justify-single-word="false" fo:text-indent="-0.018cm" style:auto-text-indent="false"/>
      <style:text-properties officeooo:paragraph-rsid="000dd10c"/>
    </style:style>
    <style:style style:name="P2" style:family="paragraph" style:parent-style-name="Standard">
      <style:paragraph-properties fo:margin-left="1.281cm" fo:margin-right="1.379cm" fo:margin-top="0cm" fo:margin-bottom="0.021cm" style:contextual-spacing="false" fo:line-height="112%" fo:text-align="center" style:justify-single-word="false" fo:text-indent="-0.018cm" style:auto-text-indent="false"/>
      <style:text-properties officeooo:paragraph-rsid="000dd10c"/>
    </style:style>
    <style:style style:name="P3" style:family="paragraph" style:parent-style-name="Standard">
      <style:paragraph-properties fo:margin-left="1.281cm" fo:margin-right="1.263cm" fo:margin-top="0cm" fo:margin-bottom="0.021cm" style:contextual-spacing="false" fo:line-height="112%" fo:text-align="center" style:justify-single-word="false" fo:text-indent="-0.018cm" style:auto-text-indent="false"/>
      <style:text-properties officeooo:paragraph-rsid="000dd10c"/>
    </style:style>
    <style:style style:name="P4" style:family="paragraph" style:parent-style-name="Standard">
      <style:paragraph-properties fo:margin-left="1.281cm" fo:margin-right="1.254cm" fo:margin-top="0cm" fo:margin-bottom="0.021cm" style:contextual-spacing="false" fo:line-height="112%" fo:text-align="center" style:justify-single-word="false" fo:text-indent="-0.018cm" style:auto-text-indent="false"/>
      <style:text-properties officeooo:paragraph-rsid="000dd10c"/>
    </style:style>
    <style:style style:name="P5" style:family="paragraph" style:parent-style-name="Standard">
      <style:paragraph-properties fo:margin-left="-0.051cm" fo:margin-top="0cm" fo:margin-bottom="0.011cm" style:contextual-spacing="false"/>
      <style:text-properties officeooo:paragraph-rsid="000dd10c"/>
    </style:style>
    <style:style style:name="P6" style:family="paragraph">
      <loext:graphic-properties draw:fill="solid" draw:fill-color="#000000"/>
      <style:paragraph-properties fo:text-align="left"/>
      <style:text-properties fo:font-size="11pt"/>
    </style:style>
    <style:style style:name="P7" style:family="paragraph" style:parent-style-name="Standard">
      <style:paragraph-properties fo:margin-left="2.999cm" fo:margin-top="0cm" fo:margin-bottom="0.616cm" style:contextual-spacing="false"/>
      <style:text-properties officeooo:paragraph-rsid="000dd10c"/>
    </style:style>
    <style:style style:name="P8" style:family="paragraph" style:parent-style-name="Standard">
      <style:paragraph-properties fo:margin-left="0.018cm" fo:margin-right="0.116cm" fo:margin-top="0cm" fo:margin-bottom="0.325cm" style:contextual-spacing="false" fo:line-height="110%" fo:text-align="center" style:justify-single-word="false" fo:text-indent="-0.018cm" style:auto-text-indent="false"/>
      <style:text-properties officeooo:paragraph-rsid="000dd10c"/>
    </style:style>
    <style:style style:name="P9" style:family="paragraph" style:parent-style-name="Standard">
      <style:paragraph-properties fo:margin-left="0.018cm" fo:margin-right="0.125cm" fo:margin-top="0cm" fo:margin-bottom="1.143cm" style:contextual-spacing="false" fo:line-height="110%" fo:text-align="center" style:justify-single-word="false" fo:text-indent="-0.018cm" style:auto-text-indent="false"/>
      <style:text-properties officeooo:paragraph-rsid="000dd10c"/>
    </style:style>
    <style:style style:name="P10" style:family="paragraph" style:parent-style-name="Standard">
      <style:paragraph-properties fo:margin-left="0.035cm" fo:margin-top="0cm" fo:margin-bottom="0cm" style:contextual-spacing="false" fo:text-align="center" style:justify-single-word="false"/>
      <style:text-properties officeooo:paragraph-rsid="000dd10c"/>
    </style:style>
    <style:style style:name="P11" style:family="paragraph" style:parent-style-name="Standard">
      <style:paragraph-properties fo:margin-left="0.035cm" fo:margin-top="0cm" fo:margin-bottom="0.053cm" style:contextual-spacing="false" fo:text-align="center" style:justify-single-word="false"/>
      <style:text-properties officeooo:paragraph-rsid="000dd10c"/>
    </style:style>
    <style:style style:name="P12" style:family="paragraph" style:parent-style-name="Standard">
      <style:paragraph-properties fo:margin-left="6.666cm" fo:margin-right="4.018cm" fo:margin-top="0cm" fo:margin-bottom="0.012cm" style:contextual-spacing="false" fo:line-height="115%" fo:text-indent="-2.025cm" style:auto-text-indent="false"/>
      <style:text-properties officeooo:paragraph-rsid="000dd10c"/>
    </style:style>
    <style:style style:name="P13" style:family="paragraph" style:parent-style-name="Standard">
      <style:paragraph-properties fo:margin-right="0.104cm" fo:margin-top="0cm" fo:margin-bottom="0cm" style:contextual-spacing="false" fo:text-align="center" style:justify-single-word="false"/>
      <style:text-properties officeooo:paragraph-rsid="000dd10c"/>
    </style:style>
    <style:style style:name="P14" style:family="paragraph" style:parent-style-name="Standard">
      <style:paragraph-properties fo:margin-top="0cm" fo:margin-bottom="0cm" style:contextual-spacing="false"/>
      <style:text-properties officeooo:paragraph-rsid="000dd10c"/>
    </style:style>
    <style:style style:name="P15" style:family="paragraph" style:parent-style-name="Standard">
      <style:paragraph-properties fo:margin-top="0cm" fo:margin-bottom="0.021cm" style:contextual-spacing="false"/>
      <style:text-properties officeooo:paragraph-rsid="000dd10c"/>
    </style:style>
    <style:style style:name="P16" style:family="paragraph" style:parent-style-name="Standard">
      <style:paragraph-properties fo:margin-right="0.559cm" fo:margin-top="0cm" fo:margin-bottom="0.048cm" style:contextual-spacing="false" fo:text-align="center" style:justify-single-word="false"/>
      <style:text-properties officeooo:paragraph-rsid="000dd10c"/>
    </style:style>
    <style:style style:name="P17" style:family="paragraph" style:parent-style-name="Standard">
      <style:paragraph-properties fo:margin-left="6.251cm" fo:margin-right="2.838cm" fo:margin-top="0cm" fo:margin-bottom="0.018cm" style:contextual-spacing="false" fo:line-height="104%" fo:text-align="center" style:justify-single-word="false" fo:text-indent="-0.018cm" style:auto-text-indent="false"/>
      <style:text-properties officeooo:paragraph-rsid="000dd10c"/>
    </style:style>
    <style:style style:name="P18" style:family="paragraph" style:parent-style-name="Standard">
      <style:paragraph-properties fo:margin-left="8.259cm" fo:margin-top="0cm" fo:margin-bottom="0cm" style:contextual-spacing="false"/>
      <style:text-properties officeooo:paragraph-rsid="000dd10c"/>
    </style:style>
    <style:style style:name="P19" style:family="paragraph" style:parent-style-name="Standard">
      <style:paragraph-properties fo:margin-left="8.259cm" fo:margin-right="0.554cm" fo:margin-top="0cm" fo:margin-bottom="0cm" style:contextual-spacing="false" fo:line-height="112%" fo:text-indent="1.736cm" style:auto-text-indent="false"/>
      <style:text-properties officeooo:paragraph-rsid="000dd10c"/>
    </style:style>
    <style:style style:name="P20" style:family="paragraph" style:parent-style-name="Standard">
      <style:paragraph-properties fo:margin-left="8.259cm" fo:margin-right="0.554cm" fo:margin-top="0cm" fo:margin-bottom="0cm" style:contextual-spacing="false" fo:line-height="112%" fo:text-indent="-0.007cm" style:auto-text-indent="false"/>
      <style:text-properties officeooo:paragraph-rsid="000dd10c"/>
    </style:style>
    <style:style style:name="P21" style:family="paragraph" style:parent-style-name="Standard">
      <style:paragraph-properties fo:margin-left="8.25cm" fo:margin-top="0cm" fo:margin-bottom="0.086cm" style:contextual-spacing="false" fo:text-indent="-0.018cm" style:auto-text-indent="false"/>
      <style:text-properties officeooo:paragraph-rsid="000dd10c"/>
    </style:style>
    <style:style style:name="P22" style:family="paragraph" style:parent-style-name="Standard">
      <style:paragraph-properties fo:margin-left="6.251cm" fo:margin-right="4.724cm" fo:margin-top="0cm" fo:margin-bottom="0.018cm" style:contextual-spacing="false" fo:line-height="104%" fo:text-align="center" style:justify-single-word="false" fo:text-indent="-0.018cm" style:auto-text-indent="false"/>
      <style:text-properties officeooo:paragraph-rsid="000dd10c"/>
    </style:style>
    <style:style style:name="P23" style:family="paragraph" style:parent-style-name="Standard">
      <style:paragraph-properties fo:margin-left="8.25cm" fo:margin-top="0cm" fo:margin-bottom="0cm" style:contextual-spacing="false" fo:text-indent="-0.018cm" style:auto-text-indent="false"/>
      <style:text-properties officeooo:paragraph-rsid="000dd10c"/>
    </style:style>
    <style:style style:name="P24" style:family="paragraph" style:parent-style-name="Standard">
      <style:paragraph-properties fo:margin-top="0cm" fo:margin-bottom="0.954cm" style:contextual-spacing="false">
        <style:tab-stops>
          <style:tab-stop style:position="10.707cm" style:type="center"/>
          <style:tab-stop style:position="12.705cm" style:type="center"/>
          <style:tab-stop style:position="14.764cm" style:type="center"/>
        </style:tab-stops>
      </style:paragraph-properties>
      <style:text-properties officeooo:paragraph-rsid="000dd10c"/>
    </style:style>
    <style:style style:name="P25" style:family="paragraph" style:parent-style-name="Standard">
      <style:paragraph-properties fo:margin-top="0cm" fo:margin-bottom="0cm" style:contextual-spacing="false" fo:line-height="100%">
        <style:tab-stops>
          <style:tab-stop style:position="10.707cm" style:type="center"/>
          <style:tab-stop style:position="12.705cm" style:type="center"/>
          <style:tab-stop style:position="14.764cm" style:type="center"/>
        </style:tab-stops>
      </style:paragraph-properties>
      <style:text-properties style:font-name="Times New Roman" fo:font-size="14pt" officeooo:paragraph-rsid="000dd10c" style:font-size-asian="14pt" style:font-name-complex="Times New Roman1" style:font-size-complex="14pt"/>
    </style:style>
    <style:style style:name="P26" style:family="paragraph" style:parent-style-name="Standard">
      <style:paragraph-properties fo:margin-top="0cm" fo:margin-bottom="0cm" style:contextual-spacing="false" fo:line-height="100%" fo:text-align="center" style:justify-single-word="false">
        <style:tab-stops>
          <style:tab-stop style:position="10.707cm" style:type="center"/>
          <style:tab-stop style:position="12.705cm" style:type="center"/>
          <style:tab-stop style:position="14.764cm" style:type="center"/>
        </style:tab-stops>
      </style:paragraph-properties>
      <style:text-properties officeooo:paragraph-rsid="000dd10c"/>
    </style:style>
    <style:style style:name="P27" style:family="paragraph" style:parent-style-name="Standard">
      <style:paragraph-properties fo:margin-top="0cm" fo:margin-bottom="0cm" style:contextual-spacing="false" fo:line-height="100%" fo:text-align="center" style:justify-single-word="false">
        <style:tab-stops>
          <style:tab-stop style:position="10.707cm" style:type="center"/>
          <style:tab-stop style:position="12.705cm" style:type="center"/>
          <style:tab-stop style:position="14.764cm" style:type="center"/>
        </style:tab-stops>
      </style:paragraph-properties>
      <style:text-properties style:font-name="Times New Roman" fo:font-size="14pt" officeooo:paragraph-rsid="000dd10c" style:font-size-asian="14pt" style:font-name-complex="Times New Roman1" style:font-size-complex="14pt"/>
    </style:style>
    <style:style style:name="P28" style:family="paragraph" style:parent-style-name="Standard">
      <style:paragraph-properties fo:line-height="150%" fo:text-align="center" style:justify-single-word="false" fo:text-indent="1.251cm" style:auto-text-indent="false"/>
      <style:text-properties fo:font-size="16pt" fo:font-weight="bold" officeooo:paragraph-rsid="000dd10c" style:font-size-asian="16pt" style:font-weight-asian="bold" style:font-size-complex="16pt"/>
    </style:style>
    <style:style style:name="P29" style:family="paragraph" style:parent-style-name="Standard">
      <style:paragraph-properties fo:margin-left="0cm" fo:line-height="150%" fo:text-align="justify" style:justify-single-word="false" fo:text-indent="0cm" style:auto-text-indent="false"/>
      <style:text-properties fo:font-size="16pt" fo:font-weight="normal" officeooo:paragraph-rsid="000dd10c" style:font-size-asian="16pt" style:font-weight-asian="normal" style:font-size-complex="16pt" style:font-weight-complex="normal"/>
    </style:style>
    <style:style style:name="P30" style:family="paragraph" style:parent-style-name="Standard">
      <style:paragraph-properties fo:margin-left="0cm" fo:line-height="150%" fo:text-align="justify" style:justify-single-word="false" fo:text-indent="0cm" style:auto-text-indent="false"/>
      <style:text-properties fo:font-size="14pt" fo:font-weight="normal" officeooo:paragraph-rsid="000dd10c" style:font-size-asian="14pt" style:font-weight-asian="normal" style:font-size-complex="14pt" style:font-weight-complex="normal"/>
    </style:style>
    <style:style style:name="P31" style:family="paragraph" style:parent-style-name="Text_20_body">
      <style:paragraph-properties fo:text-align="justify" style:justify-single-word="false"/>
      <style:text-properties fo:font-weight="bold"/>
    </style:style>
    <style:style style:name="P32" style:family="paragraph" style:parent-style-name="Text_20_body">
      <style:paragraph-properties fo:text-align="justify" style:justify-single-word="false"/>
      <style:text-properties style:font-name="Times New Roman" fo:font-size="14pt" officeooo:paragraph-rsid="00118d99" style:font-size-asian="14pt" style:font-size-complex="14pt"/>
    </style:style>
    <style:style style:name="P33" style:family="paragraph" style:parent-style-name="Text_20_body">
      <style:paragraph-properties fo:text-align="right" style:justify-single-word="false"/>
      <style:text-properties style:font-name="Times New Roman" fo:font-size="14pt" fo:font-weight="normal" style:font-size-asian="14pt" style:font-weight-asian="normal" style:font-size-complex="14pt" style:font-weight-complex="normal"/>
    </style:style>
    <style:style style:name="P34" style:family="paragraph" style:parent-style-name="Table_20_Heading">
      <style:paragraph-properties fo:text-align="left" style:justify-single-word="false"/>
      <style:text-properties style:font-name="Times New Roman" fo:font-size="14pt" fo:font-weight="normal" officeooo:rsid="00106028" officeooo:paragraph-rsid="00106028" style:font-size-asian="14pt" style:font-weight-asian="normal" style:font-size-complex="14pt" style:font-weight-complex="normal"/>
    </style:style>
    <style:style style:name="P35" style:family="paragraph" style:parent-style-name="Table_20_Heading">
      <style:paragraph-properties fo:text-align="left" style:justify-single-word="false"/>
      <style:text-properties style:font-name="Times New Roman" fo:font-size="14pt" fo:font-weight="normal" style:font-size-asian="14pt" style:font-weight-asian="normal" style:font-size-complex="14pt" style:font-weight-complex="normal"/>
    </style:style>
    <style:style style:name="P36" style:family="paragraph" style:parent-style-name="Table_20_Contents">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37" style:family="paragraph" style:parent-style-name="Table_20_Contents">
      <style:paragraph-properties fo:text-align="center" style:justify-single-word="false"/>
      <style:text-properties style:font-name="Times New Roman" fo:font-size="14pt" style:font-size-asian="14pt" style:font-size-complex="14pt"/>
    </style:style>
    <style:style style:name="P38" style:family="paragraph" style:parent-style-name="Table_20_Contents">
      <style:paragraph-properties fo:text-align="left" style:justify-single-word="false"/>
      <style:text-properties style:font-name="Times New Roman" fo:font-size="14pt" style:font-size-asian="14pt" style:font-size-complex="14pt"/>
    </style:style>
    <style:style style:name="P39" style:family="paragraph" style:parent-style-name="Table_20_Contents">
      <style:paragraph-properties fo:text-align="center" style:justify-single-word="false"/>
      <style:text-properties style:font-name="Times New Roman" fo:font-size="14pt" fo:font-weight="normal" officeooo:rsid="00135e02" officeooo:paragraph-rsid="00135e02" style:font-size-asian="14pt" style:font-weight-asian="normal" style:font-size-complex="14pt" style:font-weight-complex="normal"/>
    </style:style>
    <style:style style:name="P40" style:family="paragraph" style:parent-style-name="Text_20_body">
      <style:text-properties style:font-name="Times New Roman" fo:font-size="14pt" style:font-size-asian="14pt" style:font-size-complex="14pt"/>
    </style:style>
    <style:style style:name="P41" style:family="paragraph" style:parent-style-name="Text_20_body">
      <style:text-properties style:font-name="Times New Roman" fo:font-size="14pt" fo:font-weight="normal" style:font-size-asian="14pt" style:font-weight-asian="normal" style:font-size-complex="14pt" style:font-weight-complex="normal"/>
    </style:style>
    <style:style style:name="P42"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43" style:family="paragraph" style:parent-style-name="Text_20_body">
      <style:paragraph-properties fo:text-align="justify" style:justify-single-word="false"/>
      <style:text-properties style:font-name="Times New Roman" fo:font-size="14pt" fo:font-weight="normal" officeooo:paragraph-rsid="00135e02" style:font-size-asian="14pt" style:font-weight-asian="normal" style:font-size-complex="14pt" style:font-weight-complex="normal"/>
    </style:style>
    <style:style style:name="P44" style:family="paragraph" style:parent-style-name="Text_20_body">
      <style:paragraph-properties fo:text-align="justify" style:justify-single-word="false"/>
    </style:style>
    <style:style style:name="P45" style:family="paragraph" style:parent-style-name="Standard">
      <style:paragraph-properties fo:margin-left="0cm" fo:line-height="150%" fo:text-align="center" style:justify-single-word="false" fo:text-indent="0cm" style:auto-text-indent="false"/>
      <style:text-properties fo:font-size="16pt" fo:font-weight="bold" officeooo:paragraph-rsid="000dd10c" style:font-size-asian="16pt" style:font-weight-asian="bold" style:font-size-complex="16pt" style:font-weight-complex="bold"/>
    </style:style>
    <style:style style:name="P46" style:family="paragraph" style:parent-style-name="Standard">
      <style:paragraph-properties fo:margin-left="0cm" fo:line-height="150%" fo:text-align="justify" style:justify-single-word="false" fo:text-indent="0cm" style:auto-text-indent="false"/>
      <style:text-properties style:font-name="Times New Roman" fo:font-size="14pt" fo:language="ru" fo:country="RU" fo:font-weight="normal" officeooo:rsid="000dd10c" officeooo:paragraph-rsid="000dd10c" style:font-size-asian="14pt" style:font-weight-asian="normal" style:font-size-complex="14pt" style:font-weight-complex="normal"/>
    </style:style>
    <style:style style:name="P47" style:family="paragraph" style:parent-style-name="Text_20_body">
      <style:paragraph-properties fo:text-align="justify" style:justify-single-word="false"/>
      <style:text-properties style:font-name="Times New Roman" fo:font-size="14pt" style:font-size-asian="14pt" style:font-size-complex="14pt"/>
    </style:style>
    <style:style style:name="P4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paragraph-rsid="00132ace" style:font-size-asian="14pt" style:font-size-complex="14pt"/>
    </style:style>
    <style:style style:name="P50" style:family="paragraph" style:parent-style-name="Text_20_body" style:list-style-name="L2">
      <style:paragraph-properties fo:text-align="justify" style:justify-single-word="false"/>
      <style:text-properties style:font-name="Times New Roman" fo:font-size="14pt" officeooo:paragraph-rsid="00132ace" style:font-size-asian="14pt" style:font-size-complex="14pt"/>
    </style:style>
    <style:style style:name="P51" style:family="paragraph" style:parent-style-name="Table_20_Heading">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52" style:family="paragraph" style:parent-style-name="Table_20_Contents">
      <style:paragraph-properties fo:text-align="center" style:justify-single-word="false"/>
      <style:text-properties style:font-name="Times New Roman" fo:font-size="14pt" officeooo:rsid="00132ace" officeooo:paragraph-rsid="00132ace" style:font-size-asian="14pt" style:font-size-complex="14pt"/>
    </style:style>
    <style:style style:name="P53" style:family="paragraph" style:parent-style-name="Text_20_body">
      <style:paragraph-properties fo:text-align="justify" style:justify-single-word="false"/>
      <style:text-properties style:font-name="Times New Roman" fo:font-size="14pt" fo:font-weight="normal" officeooo:paragraph-rsid="00132ace" style:font-size-asian="14pt" style:font-weight-asian="normal" style:font-size-complex="14pt" style:font-weight-complex="normal"/>
    </style:style>
    <style:style style:name="P54" style:family="paragraph" style:parent-style-name="Standard">
      <style:paragraph-properties fo:margin-left="0cm" fo:line-height="150%" fo:text-align="center" style:justify-single-word="false" fo:text-indent="0cm" style:auto-text-indent="false"/>
      <style:text-properties style:font-name="Times New Roman" fo:font-size="16pt" fo:language="ru" fo:country="RU" fo:font-weight="bold" officeooo:rsid="000dd10c" officeooo:paragraph-rsid="000dd10c" style:font-size-asian="16pt" style:font-weight-asian="bold" style:font-size-complex="16pt" style:font-weight-complex="bold"/>
    </style:style>
    <style:style style:name="P55" style:family="paragraph" style:parent-style-name="Standard">
      <style:paragraph-properties fo:margin-left="0cm" fo:line-height="150%" fo:text-align="justify" style:justify-single-word="false" fo:text-indent="0cm" style:auto-text-indent="false"/>
      <style:text-properties style:font-name="Times New Roman" fo:font-size="14pt" fo:language="ru" fo:country="RU" fo:font-weight="normal" officeooo:rsid="000dd10c" officeooo:paragraph-rsid="000f8334" style:font-size-asian="14pt" style:font-weight-asian="normal" style:font-size-complex="14pt" style:font-weight-complex="normal"/>
    </style:style>
    <style:style style:name="P56" style:family="paragraph" style:parent-style-name="Standard" style:list-style-name="L3">
      <style:paragraph-properties fo:line-height="150%" fo:text-align="justify" style:justify-single-word="false"/>
      <style:text-properties style:font-name="Times New Roman" fo:font-size="14pt" fo:language="ru" fo:country="RU" fo:font-weight="normal" officeooo:rsid="000dd10c" officeooo:paragraph-rsid="000f8334" style:font-size-asian="14pt" style:font-weight-asian="normal" style:font-size-complex="14pt" style:font-weight-complex="normal"/>
    </style:style>
    <style:style style:name="P57" style:family="paragraph" style:parent-style-name="Standard">
      <style:paragraph-properties fo:margin-left="0cm" fo:line-height="150%" fo:text-align="justify" style:justify-single-word="false" fo:text-indent="0cm" style:auto-text-indent="false"/>
      <style:text-properties officeooo:paragraph-rsid="000dd10c"/>
    </style:style>
    <style:style style:name="P58" style:family="paragraph" style:parent-style-name="Text_20_body" style:list-style-name="L4">
      <style:text-properties style:font-name="Times New Roman" fo:font-size="14pt" style:font-size-asian="14pt" style:font-size-complex="14pt"/>
    </style:style>
    <style:style style:name="P59" style:family="paragraph" style:parent-style-name="Table_20_Contents">
      <style:paragraph-properties fo:text-align="justify" style:justify-single-word="false"/>
      <style:text-properties style:font-name="Times New Roman" fo:font-size="14pt" style:font-size-asian="14pt" style:font-size-complex="14pt"/>
    </style:style>
    <style:style style:name="P60" style:family="paragraph" style:parent-style-name="Table_20_Contents">
      <style:paragraph-properties fo:text-align="justify" style:justify-single-word="false"/>
      <style:text-properties style:font-name="Times New Roman" fo:font-size="14pt" officeooo:paragraph-rsid="00135e02" style:font-size-asian="14pt" style:font-size-complex="14pt"/>
    </style:style>
    <style:style style:name="P61" style:family="paragraph" style:parent-style-name="Text_20_body">
      <style:paragraph-properties fo:text-align="justify" style:justify-single-word="false" style:writing-mode="lr-tb" style:writing-mode-automatic="false"/>
      <style:text-properties style:font-name="Times New Roman" fo:font-size="14pt" fo:font-weight="normal" officeooo:paragraph-rsid="00135e02" style:font-size-asian="14pt" style:font-weight-asian="normal" style:font-size-complex="14pt" style:font-weight-complex="normal"/>
    </style:style>
    <style:style style:name="P62" style:family="paragraph" style:parent-style-name="Text_20_body">
      <style:paragraph-properties fo:text-align="center" style:justify-single-word="false"/>
      <style:text-properties style:font-name="Times New Roman" fo:font-size="16pt" fo:language="ru" fo:country="RU" fo:font-weight="bold" officeooo:rsid="00135e02" officeooo:paragraph-rsid="00135e02" style:font-size-asian="16pt" style:font-weight-asian="bold" style:font-size-complex="16pt" style:font-weight-complex="bold"/>
    </style:style>
    <style:style style:name="P63" style:family="paragraph" style:parent-style-name="Text_20_body">
      <style:paragraph-properties fo:text-align="justify" style:justify-single-word="false"/>
      <style:text-properties style:font-name="Times New Roman" fo:font-size="14pt" fo:language="ru" fo:country="RU" officeooo:rsid="00135e02" officeooo:paragraph-rsid="001402b1" style:font-size-asian="14pt" style:font-size-complex="14pt"/>
    </style:style>
    <style:style style:name="P64" style:family="paragraph" style:parent-style-name="Text_20_body">
      <style:paragraph-properties fo:text-align="justify" style:justify-single-word="false"/>
      <style:text-properties style:font-name="Times New Roman" fo:font-size="14pt" fo:language="ru" fo:country="RU" officeooo:rsid="001402b1" officeooo:paragraph-rsid="001402b1" style:font-size-asian="14pt" style:font-size-complex="14pt"/>
    </style:style>
    <style:style style:name="P65" style:family="paragraph" style:parent-style-name="Text_20_body">
      <style:paragraph-properties fo:text-align="justify" style:justify-single-word="false" style:writing-mode="lr-tb" style:writing-mode-automatic="false"/>
      <style:text-properties style:font-name="Times New Roman" fo:font-size="14pt" fo:language="en" fo:country="US" officeooo:rsid="001402b1" officeooo:paragraph-rsid="001402b1" style:font-size-asian="14pt" style:font-size-complex="14pt"/>
    </style:style>
    <style:style style:name="P66" style:family="paragraph" style:parent-style-name="Text_20_body">
      <style:paragraph-properties fo:text-align="center" style:justify-single-word="false" style:writing-mode="lr-tb" style:writing-mode-automatic="false"/>
      <style:text-properties style:font-name="Times New Roman" fo:font-size="16pt" fo:language="ru" fo:country="RU" fo:font-weight="bold" officeooo:rsid="001402b1" officeooo:paragraph-rsid="001402b1" style:font-size-asian="16pt" style:font-weight-asian="bold" style:font-size-complex="16pt" style:font-weight-complex="bold"/>
    </style:style>
    <style:style style:name="P67" style:family="paragraph" style:parent-style-name="Text_20_body">
      <style:paragraph-properties fo:text-align="justify" style:justify-single-word="false" style:writing-mode="lr-tb" style:writing-mode-automatic="false"/>
      <style:text-properties style:font-name="Times New Roman" fo:font-size="14pt" fo:language="ru" fo:country="RU" officeooo:rsid="001402b1" officeooo:paragraph-rsid="001513a8" style:font-size-asian="14pt" style:font-size-complex="14pt"/>
    </style:style>
    <style:style style:name="P68" style:family="paragraph" style:parent-style-name="Text_20_body">
      <style:paragraph-properties fo:text-align="justify" style:justify-single-word="false" style:writing-mode="lr-tb" style:writing-mode-automatic="false"/>
      <style:text-properties style:font-name="Times New Roman" fo:font-size="14pt" fo:language="en" fo:country="US" officeooo:rsid="001402b1" officeooo:paragraph-rsid="001513a8" style:font-size-asian="14pt" style:font-size-complex="14pt"/>
    </style:style>
    <style:style style:name="P69" style:family="paragraph" style:parent-style-name="Drawing">
      <style:paragraph-properties fo:text-align="center" style:justify-single-word="false"/>
      <style:text-properties fo:font-style="normal" style:font-style-asian="normal" style:font-style-complex="normal"/>
    </style:style>
    <style:style style:name="P70" style:family="paragraph" style:parent-style-name="Text_20_body">
      <style:paragraph-properties fo:text-align="justify" style:justify-single-word="false" style:writing-mode="lr-tb" style:writing-mode-automatic="false"/>
      <style:text-properties style:font-name="Times New Roman" fo:font-size="14pt" fo:language="ru" fo:country="RU" officeooo:rsid="001513a8" officeooo:paragraph-rsid="001513a8" style:font-size-asian="14pt" style:font-size-complex="14pt"/>
    </style:style>
    <style:style style:name="P71" style:family="paragraph" style:parent-style-name="Text_20_body" style:list-style-name="L5">
      <style:paragraph-properties fo:text-align="justify" style:justify-single-word="false" style:writing-mode="lr-tb" style:writing-mode-automatic="false"/>
      <style:text-properties style:font-name="Times New Roman" fo:font-size="14pt" fo:language="ru" fo:country="RU" officeooo:rsid="001513a8" officeooo:paragraph-rsid="001513a8" style:font-size-asian="14pt" style:font-size-complex="14pt"/>
    </style:style>
    <style:style style:name="P72" style:family="paragraph" style:parent-style-name="Text_20_body" style:list-style-name="L6">
      <style:paragraph-properties fo:text-align="justify" style:justify-single-word="false" style:writing-mode="lr-tb" style:writing-mode-automatic="false"/>
      <style:text-properties style:font-name="Times New Roman" fo:font-size="14pt" fo:language="ru" fo:country="RU" officeooo:rsid="001513a8" officeooo:paragraph-rsid="001513a8" style:font-size-asian="14pt" style:font-size-complex="14pt"/>
    </style:style>
    <style:style style:name="P73" style:family="paragraph" style:parent-style-name="Text_20_body">
      <style:paragraph-properties fo:text-align="center" style:justify-single-word="false" style:writing-mode="lr-tb" style:writing-mode-automatic="false"/>
      <style:text-properties style:font-name="Times New Roman" fo:font-size="14pt" fo:language="ru" fo:country="RU" officeooo:rsid="001513a8" officeooo:paragraph-rsid="001513a8" style:font-size-asian="14pt" style:font-size-complex="14pt"/>
    </style:style>
    <style:style style:name="P74" style:family="paragraph" style:parent-style-name="Text_20_body">
      <style:paragraph-properties fo:text-align="center" style:justify-single-word="false" style:writing-mode="lr-tb" style:writing-mode-automatic="false"/>
      <style:text-properties style:font-name="Times New Roman" fo:font-size="14pt" fo:language="ru" fo:country="RU" fo:font-weight="bold" officeooo:rsid="0015c5a2" officeooo:paragraph-rsid="0015c5a2" style:font-size-asian="14pt" style:font-weight-asian="bold" style:font-size-complex="14pt" style:font-weight-complex="bold"/>
    </style:style>
    <style:style style:name="P75" style:family="paragraph" style:parent-style-name="Text_20_body">
      <style:paragraph-properties fo:text-align="justify" style:justify-single-word="false" style:writing-mode="lr-tb" style:writing-mode-automatic="false"/>
      <style:text-properties style:font-name="Times New Roman" fo:font-size="14pt" fo:language="ru" fo:country="RU" fo:font-weight="normal" officeooo:rsid="0015c5a2" officeooo:paragraph-rsid="0015c5a2" style:font-size-asian="14pt" style:font-weight-asian="normal" style:font-size-complex="14pt" style:font-weight-complex="normal"/>
    </style:style>
    <style:style style:name="T1" style:family="text">
      <style:text-properties style:font-name="Times New Roman" fo:font-size="12pt" style:font-name-asian="Times New Roman1" style:font-size-asian="12pt" style:font-name-complex="Times New Roman1"/>
    </style:style>
    <style:style style:name="T2" style:family="text">
      <style:text-properties style:font-name="Times New Roman" fo:font-size="14pt" style:font-name-asian="Times New Roman1" style:font-size-asian="14pt" style:font-name-complex="Times New Roman1"/>
    </style:style>
    <style:style style:name="T3" style:family="text">
      <style:text-properties style:font-name="Times New Roman" fo:font-size="14pt" style:text-underline-style="solid" style:text-underline-width="auto" style:text-underline-color="#000000" style:font-name-asian="Times New Roman1" style:font-size-asian="14pt" style:font-name-complex="Times New Roman1"/>
    </style:style>
    <style:style style:name="T4" style:family="text">
      <style:text-properties style:font-name="Times New Roman" fo:font-size="16pt" style:font-name-asian="Times New Roman1" style:font-size-asian="16pt" style:font-name-complex="Times New Roman1"/>
    </style:style>
    <style:style style:name="T5" style:family="text">
      <style:text-properties style:font-name="Times New Roman" fo:font-size="16pt" fo:font-weight="bold" style:font-name-asian="Times New Roman1" style:font-size-asian="16pt" style:font-weight-asian="bold" style:font-name-complex="Times New Roman1"/>
    </style:style>
    <style:style style:name="T6" style:family="text">
      <style:text-properties style:font-name="Times New Roman" fo:font-size="13pt" style:font-name-asian="Times New Roman1" style:font-size-asian="13pt" style:font-name-complex="Times New Roman1"/>
    </style:style>
    <style:style style:name="T7" style:family="text">
      <style:text-properties style:font-name="Times New Roman" fo:font-size="13pt" fo:language="ru" fo:country="RU" style:text-underline-style="solid" style:text-underline-width="auto" style:text-underline-color="#000000" officeooo:rsid="00141fc3" style:font-name-asian="Times New Roman1" style:font-size-asian="13pt" style:font-name-complex="Times New Roman1"/>
    </style:style>
    <style:style style:name="T8" style:family="text">
      <style:text-properties style:font-name="Times New Roman" fo:font-size="13pt" style:text-underline-style="solid" style:text-underline-width="auto" style:text-underline-color="#000000" style:font-name-asian="Times New Roman1" style:font-size-asian="13pt" style:font-name-complex="Times New Roman1"/>
    </style:style>
    <style:style style:name="T9" style:family="text">
      <style:text-properties style:font-name="Times New Roman" fo:font-size="13pt" style:text-underline-style="solid" style:text-underline-width="auto" style:text-underline-color="#000000" officeooo:rsid="00141fc3" style:font-name-asian="Times New Roman1" style:font-size-asian="13pt"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style:font-name="Times New Roman" fo:font-size="14pt" style:font-size-asian="14pt" style:font-name-complex="Times New Roman1" style:font-size-complex="14pt"/>
    </style:style>
    <style:style style:name="T13" style:family="text">
      <style:text-properties style:font-name="Times New Roman" fo:font-size="16pt" fo:font-weight="bold" style:font-size-asian="16pt" style:font-weight-asian="bold" style:font-name-complex="Times New Roman1" style:font-size-complex="16pt"/>
    </style:style>
    <style:style style:name="T14" style:family="text">
      <style:text-properties style:font-name="Times New Roman" fo:font-size="16pt" fo:font-weight="normal" style:font-size-asian="16pt" style:font-weight-asian="normal" style:font-name-complex="Times New Roman1" style:font-size-complex="16pt" style:font-weight-complex="normal"/>
    </style:style>
    <style:style style:name="T15" style:family="text">
      <style:text-properties fo:font-size="14pt" style:font-size-asian="14pt" style:font-size-complex="14pt"/>
    </style:style>
    <style:style style:name="T16" style:family="text">
      <style:text-properties style:font-name="Times New Roman" fo:font-size="14pt" fo:font-weight="normal" officeooo:rsid="00106028" style:font-size-asian="14pt" style:font-weight-asian="normal" style:font-size-complex="14pt" style:font-weight-complex="normal"/>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officeooo:rsid="000f8334"/>
    </style:style>
    <style:style style:name="T20" style:family="text">
      <style:text-properties fo:language="en" fo:country="US" officeooo:rsid="000f8334"/>
    </style:style>
    <style:style style:name="T21" style:family="text">
      <style:text-properties officeooo:rsid="00135e02"/>
    </style:style>
    <style:style style:name="T22" style:family="text">
      <style:text-properties style:font-name="Times New Roman" fo:font-size="16pt" fo:language="ru" fo:country="RU" fo:font-weight="normal" style:font-size-asian="16pt" style:font-weight-asian="normal" style:font-name-complex="Times New Roman1" style:font-size-complex="16pt" style:font-weight-complex="normal"/>
    </style:style>
    <style:style style:name="T23" style:family="text">
      <style:text-properties officeooo:rsid="00118d99"/>
    </style:style>
    <style:style style:name="T24" style:family="text">
      <style:text-properties fo:language="ru" fo:country="RU" officeooo:rsid="00132ace"/>
    </style:style>
    <style:style style:name="T25" style:family="text">
      <style:text-properties officeooo:rsid="00132ace"/>
    </style:style>
    <style:style style:name="T26" style:family="text">
      <style:text-properties fo:language="en" fo:country="US" officeooo:rsid="00118d99"/>
    </style:style>
    <style:style style:name="T27" style:family="text">
      <style:text-properties fo:language="en" fo:country="US"/>
    </style:style>
    <style:style style:name="T28" style:family="text">
      <style:text-properties style:font-name="Times New Roman" fo:font-size="14pt" fo:language="ru" fo:country="RU" fo:font-weight="normal" officeooo:rsid="00135e02" style:font-size-asian="14pt" style:font-weight-asian="normal" style:font-size-complex="14pt" style:font-weight-complex="normal"/>
    </style:style>
    <style:style style:name="T29" style:family="text">
      <style:text-properties fo:language="en" fo:country="US" officeooo:rsid="00135e02"/>
    </style:style>
    <style:style style:name="T30" style:family="text">
      <style:text-properties officeooo:rsid="001402b1"/>
    </style:style>
    <style:style style:name="T31" style:family="text">
      <style:text-properties fo:language="en" fo:country="US" officeooo:rsid="001402b1"/>
    </style:style>
    <style:style style:name="T32" style:family="text">
      <style:text-properties fo:language="ru" fo:country="RU" officeooo:rsid="001513a8"/>
    </style:style>
    <style:style style:name="T33" style:family="text">
      <style:text-properties style:font-name="Times New Roman" style:font-family-asian="Calibri" style:font-family-generic-asian="system" style:font-pitch-asian="variable" style:font-name-complex="Times New Roman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8cm, 2.177cm, 0cm, 1.18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6cm, 1.782cm, 0cm, 0.84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cm" fo:min-width="16.697cm" fo:padding-top="0.127cm" fo:padding-bottom="0.127cm" fo:padding-left="0.254cm" fo:padding-right="0.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ИНИСТЕРСТВО ЦИФРОВОГО РАЗВИТИЯ, </text:span></text:p>
      <text:p text:style-name="P2"><text:span text:style-name="T1">СВЯЗИ И МАССОВЫХ КОММУНИКАЦИЙ РОССИЙСКОЙ ФЕДЕРАЦИИ </text:span></text:p>
      <text:p text:style-name="P3"><text:span text:style-name="T1">Федеральное государственное образовательное бюджетное учреждение высшего профессионального образования </text:span></text:p>
      <text:p text:style-name="P4"><text:span text:style-name="T1">«Санкт-Петербургский государственный университет телекоммуникаций им. проф. М.А. Бонч-Бруевича» </text:span></text:p>
      <text:p text:style-name="P5"><draw:g text:anchor-type="as-char" draw:z-index="0" draw:name="Группа 8" draw:style-name="gr1"><draw:custom-shape draw:name="Shape 2" draw:style-name="gr2" draw:text-style-name="P6" svg:width="17.204cm" svg:height="0.018cm" svg:x="0cm" svg:y="0cm"><text:p/><draw:enhanced-geometry draw:mirror-horizontal="false" draw:mirror-vertical="false" draw:glue-points="?f0 ?f1 ?f2 ?f3 ?f4 ?f5 ?f6 ?f7 ?f8 ?f9" drawooo:sub-view-size="6192901 9144" draw:text-areas="?f10 ?f11 ?f12 ?f13" svg:viewBox="0 0 0 0" draw:type="ooxml-non-primitive" draw:enhanced-path="M 0 0 L 6192901 0 6192901 9144 0 9144 0 0 N"><draw:equation draw:name="f0" draw:formula="0*logwidth/6192901"/><draw:equation draw:name="f1" draw:formula="0*logheight/9144"/><draw:equation draw:name="f2" draw:formula="6192901*logwidth/6192901"/><draw:equation draw:name="f3" draw:formula="0*logheight/9144"/><draw:equation draw:name="f4" draw:formula="6192901*logwidth/6192901"/><draw:equation draw:name="f5" draw:formula="9144*logheight/9144"/><draw:equation draw:name="f6" draw:formula="0*logwidth/6192901"/><draw:equation draw:name="f7" draw:formula="9144*logheight/9144"/><draw:equation draw:name="f8" draw:formula="0*logwidth/6192901"/><draw:equation draw:name="f9" draw:formula="0*logheight/9144"/><draw:equation draw:name="f10" draw:formula="0*logwidth/6192901"/><draw:equation draw:name="f11" draw:formula="0*logheight/9144"/><draw:equation draw:name="f12" draw:formula="6192901*logwidth/6192901"/><draw:equation draw:name="f13" draw:formula="9144*logheight/9144"/></draw:enhanced-geometry></draw:custom-shape></draw:g></text:p>
      <text:p text:style-name="P7"><text:span text:style-name="T2"><text:s/></text:span></text:p>
      <text:p text:style-name="P8"><text:span text:style-name="T2">Факультет </text:span><text:span text:style-name="T3">Информационных технологий и программной инженерии</text:span><text:span text:style-name="T2"> </text:span></text:p>
      <text:p text:style-name="P9"><text:span text:style-name="T2">Кафедра </text:span><text:span text:style-name="T3">Программной инженерии и вычислительной техники</text:span><text:span text:style-name="T2"> </text:span></text:p>
      <text:p text:style-name="P10"><text:span text:style-name="T4"><text:s/></text:span></text:p>
      <text:p text:style-name="P10"><text:span text:style-name="T4"><text:s/></text:span></text:p>
      <text:p text:style-name="P11"><text:span text:style-name="T4"><text:s/></text:span></text:p>
      <text:p text:style-name="P12"><text:span text:style-name="T4">ЛАБОРАТОРНАЯ РАБОТА №2 по дисциплине: </text:span></text:p>
      <text:p text:style-name="P13"><text:span text:style-name="T5">«Алгоритмы и структуры данных»</text:span><text:span text:style-name="T4"> </text:span></text:p>
      <text:p text:style-name="P14"><text:span text:style-name="T4"><text:s/></text:span></text:p>
      <text:p text:style-name="P14"><text:span text:style-name="T4"><text:s/></text:span></text:p>
      <text:p text:style-name="P14"><text:span text:style-name="T4"><text:s/></text:span></text:p>
      <text:p text:style-name="P14"><text:span text:style-name="T4"><text:s/></text:span></text:p>
      <text:p text:style-name="P15"><text:span text:style-name="T1"><text:s/></text:span></text:p>
      <text:p text:style-name="P14"><text:span text:style-name="T2"><text:s/></text:span></text:p>
      <text:p text:style-name="P16"><text:span text:style-name="T2"><text:s/></text:span></text:p>
      <text:p text:style-name="P17"><text:span text:style-name="T2"><text:s text:c="10"/>Выполнили студенты: </text:span></text:p>
      <text:p text:style-name="P18" loext:marker-style-name="T6"><text:span text:style-name="T7">Мананков</text:span><text:span text:style-name="T8"> </text:span><text:span text:style-name="T9">А</text:span><text:span text:style-name="T8">. </text:span><text:span text:style-name="T9">П</text:span><text:span text:style-name="T8">. <text:s/></text:span><text:span text:style-name="T6">____________ </text:span></text:p>
      <text:p text:style-name="P19" loext:marker-style-name="T10"><text:span text:style-name="T11">(Ф.И.О., № группы) <text:s/>(подпись)</text:span><text:span text:style-name="T10"> </text:span></text:p>
      <text:p text:style-name="P18" loext:marker-style-name="T6"><text:span text:style-name="T9">Пырх</text:span><text:span text:style-name="T8"> </text:span><text:span text:style-name="T9">И</text:span><text:span text:style-name="T8">. </text:span><text:span text:style-name="T9">С</text:span><text:span text:style-name="T8">. <text:s/></text:span><text:span text:style-name="T6">____________ </text:span></text:p>
      <text:p text:style-name="P19" loext:marker-style-name="T10"><text:span text:style-name="T11">(Ф.И.О., № группы) <text:s/>(подпись)</text:span></text:p>
      <text:p text:style-name="P20"><text:span text:style-name="T2">Дата выполнения: </text:span></text:p>
      <text:p text:style-name="P21"><text:span text:style-name="T6">«____» __________________2025г </text:span></text:p>
      <text:p text:style-name="P22"><text:span text:style-name="T2"><text:s text:c="6"/>Проверил: </text:span></text:p>
      <text:p text:style-name="P23"><text:span text:style-name="T8">Дагаев А. В.</text:span><text:span text:style-name="T6">__________________ </text:span></text:p>
      <text:p text:style-name="P24"><text:tab/><text:span text:style-name="T11">(Ф.И.О.) <text:s/><text:tab/> <text:tab/>(подпись) </text:span></text:p>
      <text:p text:style-name="P25" loext:marker-style-name="T12"/>
      <text:p text:style-name="P25" loext:marker-style-name="T12"/>
      <text:p text:style-name="P25" loext:marker-style-name="T12"/>
      <text:p text:style-name="P26" loext:marker-style-name="T12"><text:span text:style-name="T12">Санкт-Петербург,</text:span></text:p>
      <text:p text:style-name="P27" loext:marker-style-name="T12">2026г.</text:p>
      <text:p text:style-name="P28" loext:marker-style-name="T13"><text:soft-page-break/>Алгоритм поиска полным перебором</text:p>
      <text:p text:style-name="P29" loext:marker-style-name="T14"><text:tab/><text:span text:style-name="T15">Последовательно перебираем все позиции i от 0 до n-m в строке длины n. Для каждой позиции проверяем, совпадает ли подстрока длины m с фрагментом строки, начиная с i. Если совпадение найдено, возвращаем индекс i и завершаем работу.</text:span></text:p>
      <text:p text:style-name="P30" loext:marker-style-name="T14"><text:tab/>Пусть n – длина строки, m – длина искомой подстроки. Тогда:</text:p>
      <text:p text:style-name="P30" loext:marker-style-name="T14">Худшее время: O(n*m)</text:p>
      <text:p text:style-name="P30" loext:marker-style-name="T14">Среднее время: O(n)</text:p>
      <text:p text:style-name="P30" loext:marker-style-name="T14">Лучшее время: O(m) или O(n)</text:p>
      <text:p text:style-name="P30" loext:marker-style-name="T14">Затраты памяти: O(1)</text:p>
      <text:p text:style-name="P31"><text:tab/><text:span text:style-name="T16">Пример работы алгоритма:</text:span></text:p>
      <text:p text:style-name="P32"><text:span text:style-name="T17">Строка</text:span><text:span text:style-name="T18">:</text:span> ababba (длина n = 6)</text:p>
      <text:p text:style-name="P32"><text:span text:style-name="T17">Искомая подстрока</text:span><text:span text:style-name="T18">:</text:span> abb (длина m = 3)</text:p>
      <text:p text:style-name="P33">Таб<text:span text:style-name="T19">лица</text:span> 1 – пример работы алгоритма поиска <text:span text:style-name="T19">полным перебором</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4">Шаг</text:p>
            </table:table-cell>
            <table:table-cell table:style-name="Таблица1.A1" office:value-type="string">
              <text:p text:style-name="P35">Строка</text:p>
            </table:table-cell>
            <table:table-cell table:style-name="Таблица1.C1" office:value-type="string">
              <text:p text:style-name="P35">Пояснение</text:p>
            </table:table-cell>
          </table:table-row>
        </table:table-header-rows>
        <table:table-row>
          <table:table-cell table:style-name="Таблица1.A2" office:value-type="string">
            <text:p text:style-name="P36">0</text:p>
          </table:table-cell>
          <table:table-cell table:style-name="Таблица1.A2" office:value-type="string">
            <text:p text:style-name="P37">a <text:s/>b <text:s/>a <text:s/>b <text:s/>b <text:s/>a</text:p>
          </table:table-cell>
          <table:table-cell table:style-name="Таблица1.C2" office:value-type="string">
            <text:p text:style-name="P38">Исходная строка</text:p>
          </table:table-cell>
        </table:table-row>
        <table:table-row>
          <table:table-cell table:style-name="Таблица1.A2" office:value-type="string">
            <text:p text:style-name="P36">1</text:p>
          </table:table-cell>
          <table:table-cell table:style-name="Таблица1.A2" office:value-type="string">
            <text:p text:style-name="P37">[a] b <text:s/>a <text:s/>b <text:s/>b <text:s/>a</text:p>
          </table:table-cell>
          <table:table-cell table:style-name="Таблица1.C2" office:value-type="string">
            <text:p text:style-name="P38">Начало проверки на позиции 0. Сравниваем подстрока[0]=a со строкой[0]=a</text:p>
          </table:table-cell>
        </table:table-row>
        <table:table-row>
          <table:table-cell table:style-name="Таблица1.A2" office:value-type="string">
            <text:p text:style-name="P39">2</text:p>
          </table:table-cell>
          <table:table-cell table:style-name="Таблица1.A2" office:value-type="string">
            <text:p text:style-name="P37">a [b] a <text:s/>b <text:s/>b <text:s/>a</text:p>
          </table:table-cell>
          <table:table-cell table:style-name="Таблица1.C2" office:value-type="string">
            <text:p text:style-name="P38">Совпало. Сравниваем подстрока[1]=b со строкой[1]=b</text:p>
          </table:table-cell>
        </table:table-row>
        <table:table-row>
          <table:table-cell table:style-name="Таблица1.A2" office:value-type="string">
            <text:p text:style-name="P39">3</text:p>
          </table:table-cell>
          <table:table-cell table:style-name="Таблица1.A2" office:value-type="string">
            <text:p text:style-name="P37">a <text:s/>b [a] b <text:s/>b <text:s/>a</text:p>
          </table:table-cell>
          <table:table-cell table:style-name="Таблица1.C2" office:value-type="string">
            <text:p text:style-name="P38">Совпало. Сравниваем подстрока[2]=b со строкой[2]=a – <text:span text:style-name="T17">несовпадение.</text:span> Переход.</text:p>
          </table:table-cell>
        </table:table-row>
        <table:table-row>
          <table:table-cell table:style-name="Таблица1.A2" office:value-type="string">
            <text:p text:style-name="P39">4</text:p>
          </table:table-cell>
          <table:table-cell table:style-name="Таблица1.A2" office:value-type="string">
            <text:p text:style-name="P37">a <text:span text:style-name="T20">[</text:span>b<text:span text:style-name="T20">]</text:span> a b <text:s/>b <text:s/>a</text:p>
          </table:table-cell>
          <table:table-cell table:style-name="Таблица1.C2" office:value-type="string">
            <text:p text:style-name="P38">Начало на позиции 1: подстрока[0]=a <text:span text:style-name="T19">и</text:span> строка[1]=b – <text:span text:style-name="T17">несовпадение</text:span>. Переход.</text:p>
          </table:table-cell>
        </table:table-row>
        <table:table-row>
          <table:table-cell table:style-name="Таблица1.A2" office:value-type="string">
            <text:p text:style-name="P39">5</text:p>
          </table:table-cell>
          <table:table-cell table:style-name="Таблица1.A2" office:value-type="string">
            <text:p text:style-name="P37">a <text:s/>b <text:span text:style-name="T20">[</text:span>a<text:span text:style-name="T20">]</text:span> b b <text:s/>a</text:p>
          </table:table-cell>
          <table:table-cell table:style-name="Таблица1.C2" office:value-type="string">
            <text:p text:style-name="P38">Начало на позиции 2: подстрока[0]=a <text:span text:style-name="T19">и</text:span> строка[2]=a – совпадение.</text:p>
          </table:table-cell>
        </table:table-row>
        <table:table-row>
          <table:table-cell table:style-name="Таблица1.A2" office:value-type="string">
            <text:p text:style-name="P39">6</text:p>
          </table:table-cell>
          <table:table-cell table:style-name="Таблица1.A2" office:value-type="string">
            <text:p text:style-name="P37">a <text:s/>b <text:s/>a <text:span text:style-name="T20">[</text:span>b<text:span text:style-name="T20">]</text:span> b a</text:p>
          </table:table-cell>
          <table:table-cell table:style-name="Таблица1.C2" office:value-type="string">
            <text:p text:style-name="P38">Сравниваем подстрока[1]=b <text:span text:style-name="T19">и</text:span> строка[3]=b – совпадение.</text:p>
          </table:table-cell>
        </table:table-row>
        <table:table-row>
          <table:table-cell table:style-name="Таблица1.A2" office:value-type="string">
            <text:p text:style-name="P39">7</text:p>
          </table:table-cell>
          <table:table-cell table:style-name="Таблица1.A2" office:value-type="string">
            <text:p text:style-name="P37">a <text:s/>b <text:s/>a <text:s/>b <text:span text:style-name="T20">[</text:span>b<text:span text:style-name="T20">]</text:span> a</text:p>
          </table:table-cell>
          <table:table-cell table:style-name="Таблица1.C2" office:value-type="string">
            <text:p text:style-name="P38">Сравниваем подстрока[2]=b vs строка[4]=b – совпадение. <text:span text:style-name="T17">Все символы совпали</text:span><text:span text:style-name="T17"> </text:span>– найдено вхождение на позиции 2.</text:p>
          </table:table-cell>
        </table:table-row>
      </table:table>
      <text:p text:style-name="P40"/>
      <text:p text:style-name="P41"/>
      <text:p text:style-name="P42"><text:soft-page-break/>Пошаговое описание:</text:p>
      <text:p text:style-name="P42">Шаг 1: Выбираем начало подстроки на позиции 0 (синяя ячейка).</text:p>
      <text:p text:style-name="P42">Шаг <text:span text:style-name="T21">2</text:span>: Сравниваем первый символ – a с a – зелёное совпадение, переходим дальше.</text:p>
      <text:p text:style-name="P42">Шаг <text:span text:style-name="T21">3</text:span>: Сравниваем второй символ – b с b – зелёное совпадение, переходим.</text:p>
      <text:p text:style-name="P42">Шаг <text:span text:style-name="T21">4</text:span>: Сравниваем третий символ – подстрока[2]=b со строкой[2]=a – красное несовпадение. Останавливаем этот сдвиг.</text:p>
      <text:p text:style-name="P42">Шаг <text:span text:style-name="T21">5</text:span>: Сдвигаем начало на позицию 1. Первый символ подстроки (a) не совпадает со строкой[1]=b – сразу переход.</text:p>
      <text:p text:style-name="P42">Шаг <text:span text:style-name="T21">6</text:span>: Сдвигаем на позицию 2. Первый символ совпал (a).</text:p>
      <text:p text:style-name="P42">Шаг <text:span text:style-name="T21">7</text:span>: Второй символ совпал (b).</text:p>
      <text:p text:style-name="P43">Шаг <text:span text:style-name="T21">8</text:span>: Третий символ совпал (b). Нашли полное вхождение на индексе 2.</text:p>
      <text:p text:style-name="P43">Итого: 3 сдвига, 6 сравнений.</text:p>
      <text:p text:style-name="P44"/>
      <text:p text:style-name="P29"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
      <text:p text:style-name="P45" loext:marker-style-name="T14"><text:soft-page-break/>Алгоритм Кнута-Морриса-Пратта (КМР)</text:p>
      <text:p text:style-name="P46" loext:marker-style-name="T14"><text:tab/>Алгоритм использует информацию о частичном совпадении шаблона с текстом, чтобы не возвращаться к уже пройденным символам. Вместо сдвига на один символ на каждом шаге, алгоритм вычисляет заранее (с помощью префикс-функции) максимальную длину совпадающих префикса и суффикса для каждого префикса шаблона. Это позволяет при возникновении несовпадения сдвинуть шаблон на столько позиций, чтобы не проверять заново уже совпавшую часть, при этом префикс и суффикс могут пересекаться. В процессе поиска, когда символ шаблона не совпадает с символом строки, алгоритм берет значение префикс-функции от предыдущего символа шаблона и продолжает сравнение с того же места в строке. Таким образом, строка просматривается последовательно без возвратов.</text:p>
      <text:p text:style-name="P46" loext:marker-style-name="T14"><text:tab/>Пусть n – длина строки, m – длина шаблона. Тогда:</text:p>
      <text:p text:style-name="P46" loext:marker-style-name="T14">Худшее время: O(n+m) </text:p>
      <text:p text:style-name="P46" loext:marker-style-name="T14">Среднее время: O(n+m) </text:p>
      <text:p text:style-name="P46" loext:marker-style-name="T14">Лучшее время: O(n+m) </text:p>
      <text:p text:style-name="P46" loext:marker-style-name="T14">Затраты памяти: O(m)</text:p>
      <text:p text:style-name="P46" loext:marker-style-name="T22"><text:tab/><text:span text:style-name="T23">Пример работы алгоритма:</text:span></text:p>
      <text:p text:style-name="P40"><text:span text:style-name="T17">Строка</text:span><text:span text:style-name="T18">:</text:span> a b a b b a (длина n = 6)<text:line-break/><text:span text:style-name="T17">Подстрока</text:span><text:span text:style-name="T18">:</text:span> a b b (длина m = 3)</text:p>
      <text:p text:style-name="P47"><text:tab/>Сначала вычислим <text:span text:style-name="T17">префикс-функцию</text:span> для подстроки abb.<text:line-break/>Префикс-функция π[i] – длина наибольшего собственного префикса, который является также суффиксом для подстроки p[0..i].</text:p>
      <text:list text:style-name="L1">
        <text:list-item>
          <text:p text:style-name="P48">p = a b b</text:p>
        </text:list-item>
        <text:list-item>
          <text:p text:style-name="P48">π[0] = 0 (у одного символа нет собственного префикса)</text:p>
        </text:list-item>
        <text:list-item>
          <text:p text:style-name="P48">π[1]: подстрока ab. Префиксы: a, суффиксы: b – не совпадают → 0</text:p>
        </text:list-item>
        <text:list-item>
          <text:p text:style-name="P48">π[2]: подстрока abb. Префиксы: a, ab; суффиксы: b, bb. Совпадений нет → 0</text:p>
        </text:list-item>
      </text:list>
      <text:p text:style-name="P47">Итого: <text:span text:style-name="T17">π = [0, 0, 0]</text:span></text:p>
      <text:p text:style-name="P40"/>
      <text:p text:style-name="P49"><text:soft-page-break/><text:tab/>Теперь <text:span text:style-name="T24">переходим к </text:span>работ<text:span text:style-name="T25">е </text:span>алгоритма КМП.</text:p>
      <text:p text:style-name="P49">Обозначения:</text:p>
      <text:list text:style-name="L2">
        <text:list-item>
          <text:p text:style-name="P50">i – текущий индекс в строке (движется только вперёд),</text:p>
        </text:list-item>
        <text:list-item>
          <text:p text:style-name="P50">j – текущий индекс в подстроке (длина совпавшей части).</text:p>
        </text:list-item>
        <text:list-item>
          <text:p text:style-name="P50">s – это строка (текст), в которой выполняется поиск <text:span text:style-name="T25">(</text:span>"ababba"<text:span text:style-name="T25">)</text:span>.</text:p>
        </text:list-item>
        <text:list-item>
          <text:p text:style-name="P50">p – это подстрока (паттерн), которую ищем <text:span text:style-name="T25">(</text:span>"abb"<text:span text:style-name="T25">)</text:span>.</text:p>
        </text:list-item>
      </text:list>
      <text:p text:style-name="P49">На каждом шаге сравниваем s[i] и p[j]. При совпадении увеличиваем i и j. При несовпадении: если j &gt; 0, то j = π[j-1] (без изменения i); иначе увеличиваем i.<text:line-break/>Вхождение найдено, когда j == m (тогда индекс в строке: i - m).</text:p>
      <text:p text:style-name="P33">Таб<text:span text:style-name="T25">лица</text:span> 2 – <text:span text:style-name="T24">пример </text:span>работа алгоритма КМП.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header-rows>
          <table:table-row>
            <table:table-cell table:style-name="Таблица2.A1" office:value-type="string">
              <text:p text:style-name="P51">Шаг</text:p>
            </table:table-cell>
            <table:table-cell table:style-name="Таблица2.A1" office:value-type="string">
              <text:p text:style-name="P51">i</text:p>
            </table:table-cell>
            <table:table-cell table:style-name="Таблица2.A1" office:value-type="string">
              <text:p text:style-name="P51">Строка </text:p>
            </table:table-cell>
            <table:table-cell table:style-name="Таблица2.A1" office:value-type="string">
              <text:p text:style-name="P51"><text:span text:style-name="T26">j</text:span> <text:span text:style-name="T23">до</text:span></text:p>
            </table:table-cell>
            <table:table-cell table:style-name="Таблица2.A1" office:value-type="string">
              <text:p text:style-name="P51">Сравнение s[i] и p[j]</text:p>
            </table:table-cell>
            <table:table-cell table:style-name="Таблица2.A1" office:value-type="string">
              <text:p text:style-name="P51">Действие</text:p>
            </table:table-cell>
            <table:table-cell table:style-name="Таблица2.G1" office:value-type="string">
              <text:p text:style-name="P51">j после</text:p>
            </table:table-cell>
          </table:table-row>
        </table:table-header-rows>
        <table:table-row>
          <table:table-cell table:style-name="Таблица2.A2" office:value-type="string">
            <text:p text:style-name="P37">1</text:p>
          </table:table-cell>
          <table:table-cell table:style-name="Таблица2.A2" office:value-type="string">
            <text:p text:style-name="P37">0</text:p>
          </table:table-cell>
          <table:table-cell table:style-name="Таблица2.A2" office:value-type="string">
            <text:p text:style-name="P37">[a] b a b b a</text:p>
          </table:table-cell>
          <table:table-cell table:style-name="Таблица2.A2" office:value-type="string">
            <text:p text:style-name="P37">0</text:p>
          </table:table-cell>
          <table:table-cell table:style-name="Таблица2.A2" office:value-type="string">
            <text:p text:style-name="P37">'a' == 'a' совпадение</text:p>
          </table:table-cell>
          <table:table-cell table:style-name="Таблица2.A2" office:value-type="string">
            <text:p text:style-name="P37">i++, j++</text:p>
          </table:table-cell>
          <table:table-cell table:style-name="Таблица2.G2" office:value-type="string">
            <text:p text:style-name="P37">1</text:p>
          </table:table-cell>
        </table:table-row>
        <table:table-row>
          <table:table-cell table:style-name="Таблица2.A2" office:value-type="string">
            <text:p text:style-name="P37">2</text:p>
          </table:table-cell>
          <table:table-cell table:style-name="Таблица2.A2" office:value-type="string">
            <text:p text:style-name="P37">1</text:p>
          </table:table-cell>
          <table:table-cell table:style-name="Таблица2.A2" office:value-type="string">
            <text:p text:style-name="P37">a [b] a b b a</text:p>
          </table:table-cell>
          <table:table-cell table:style-name="Таблица2.A2" office:value-type="string">
            <text:p text:style-name="P37">1</text:p>
          </table:table-cell>
          <table:table-cell table:style-name="Таблица2.A2" office:value-type="string">
            <text:p text:style-name="P37">'b' == 'b' совпадение</text:p>
          </table:table-cell>
          <table:table-cell table:style-name="Таблица2.A2" office:value-type="string">
            <text:p text:style-name="P37">i++, j++</text:p>
          </table:table-cell>
          <table:table-cell table:style-name="Таблица2.G2" office:value-type="string">
            <text:p text:style-name="P37">2</text:p>
          </table:table-cell>
        </table:table-row>
        <table:table-row>
          <table:table-cell table:style-name="Таблица2.A2" office:value-type="string">
            <text:p text:style-name="P37">3</text:p>
          </table:table-cell>
          <table:table-cell table:style-name="Таблица2.A2" office:value-type="string">
            <text:p text:style-name="P37">2</text:p>
          </table:table-cell>
          <table:table-cell table:style-name="Таблица2.A2" office:value-type="string">
            <text:p text:style-name="P37">a b [a] b b a</text:p>
          </table:table-cell>
          <table:table-cell table:style-name="Таблица2.A2" office:value-type="string">
            <text:p text:style-name="P37">2</text:p>
          </table:table-cell>
          <table:table-cell table:style-name="Таблица2.A2" office:value-type="string">
            <text:p text:style-name="P37">'a' == 'b' несовпадение</text:p>
          </table:table-cell>
          <table:table-cell table:style-name="Таблица2.A2" office:value-type="string">
            <text:p text:style-name="P37">j = π[<text:span text:style-name="T25">2-</text:span>1] = 0</text:p>
          </table:table-cell>
          <table:table-cell table:style-name="Таблица2.G2" office:value-type="string">
            <text:p text:style-name="P37">0</text:p>
          </table:table-cell>
        </table:table-row>
        <table:table-row>
          <table:table-cell table:style-name="Таблица2.A2" office:value-type="string">
            <text:p text:style-name="P37">4</text:p>
          </table:table-cell>
          <table:table-cell table:style-name="Таблица2.A2" office:value-type="string">
            <text:p text:style-name="P37">2</text:p>
          </table:table-cell>
          <table:table-cell table:style-name="Таблица2.A2" office:value-type="string">
            <text:p text:style-name="P37">a b [a] b b a</text:p>
          </table:table-cell>
          <table:table-cell table:style-name="Таблица2.A2" office:value-type="string">
            <text:p text:style-name="P37">0</text:p>
          </table:table-cell>
          <table:table-cell table:style-name="Таблица2.A2" office:value-type="string">
            <text:p text:style-name="P37">'a' == 'a' совпадение</text:p>
          </table:table-cell>
          <table:table-cell table:style-name="Таблица2.A2" office:value-type="string">
            <text:p text:style-name="P37">i++, j++</text:p>
          </table:table-cell>
          <table:table-cell table:style-name="Таблица2.G2" office:value-type="string">
            <text:p text:style-name="P37">1</text:p>
          </table:table-cell>
        </table:table-row>
        <table:table-row>
          <table:table-cell table:style-name="Таблица2.A2" office:value-type="string">
            <text:p text:style-name="P37">5</text:p>
          </table:table-cell>
          <table:table-cell table:style-name="Таблица2.A2" office:value-type="string">
            <text:p text:style-name="P37">3</text:p>
          </table:table-cell>
          <table:table-cell table:style-name="Таблица2.A2" office:value-type="string">
            <text:p text:style-name="P37">a b a [b] b a</text:p>
          </table:table-cell>
          <table:table-cell table:style-name="Таблица2.A2" office:value-type="string">
            <text:p text:style-name="P37">1</text:p>
          </table:table-cell>
          <table:table-cell table:style-name="Таблица2.A2" office:value-type="string">
            <text:p text:style-name="P37">'b' == 'b' совпадение</text:p>
          </table:table-cell>
          <table:table-cell table:style-name="Таблица2.A2" office:value-type="string">
            <text:p text:style-name="P37">i++, j++</text:p>
          </table:table-cell>
          <table:table-cell table:style-name="Таблица2.G2" office:value-type="string">
            <text:p text:style-name="P37">2</text:p>
          </table:table-cell>
        </table:table-row>
        <table:table-row>
          <table:table-cell table:style-name="Таблица2.A2" office:value-type="string">
            <text:p text:style-name="P37">6</text:p>
          </table:table-cell>
          <table:table-cell table:style-name="Таблица2.A2" office:value-type="string">
            <text:p text:style-name="P37">4</text:p>
          </table:table-cell>
          <table:table-cell table:style-name="Таблица2.A2" office:value-type="string">
            <text:p text:style-name="P37">a b a b [b] a</text:p>
          </table:table-cell>
          <table:table-cell table:style-name="Таблица2.A2" office:value-type="string">
            <text:p text:style-name="P37">2</text:p>
          </table:table-cell>
          <table:table-cell table:style-name="Таблица2.A2" office:value-type="string">
            <text:p text:style-name="P37">'b' == 'b' совпадение</text:p>
          </table:table-cell>
          <table:table-cell table:style-name="Таблица2.A2" office:value-type="string">
            <text:p text:style-name="P37">i++, j++</text:p>
          </table:table-cell>
          <table:table-cell table:style-name="Таблица2.G2" office:value-type="string">
            <text:p text:style-name="P37">3</text:p>
          </table:table-cell>
        </table:table-row>
        <table:table-row>
          <table:table-cell table:style-name="Таблица2.A2" office:value-type="string">
            <text:p text:style-name="P37">7</text:p>
          </table:table-cell>
          <table:table-cell table:style-name="Таблица2.A2" office:value-type="string">
            <text:p text:style-name="P52">5</text:p>
          </table:table-cell>
          <table:table-cell table:style-name="Таблица2.A2" office:value-type="string">
            <text:p text:style-name="P37">–</text:p>
          </table:table-cell>
          <table:table-cell table:style-name="Таблица2.A2" office:value-type="string">
            <text:p text:style-name="P37">3</text:p>
          </table:table-cell>
          <table:table-cell table:style-name="Таблица2.A2" office:value-type="string">
            <text:p text:style-name="P37">–</text:p>
          </table:table-cell>
          <table:table-cell table:style-name="Таблица2.A2" office:value-type="string">
            <text:p text:style-name="P36">Найдено вхождение на позиции <text:span text:style-name="T25">5-3=2</text:span></text:p>
          </table:table-cell>
          <table:table-cell table:style-name="Таблица2.G2" office:value-type="string">
            <text:p text:style-name="P37">–</text:p>
          </table:table-cell>
        </table:table-row>
      </table:table>
      <text:p text:style-name="P40"/>
      <text:p text:style-name="P53">Пошаговое описание:</text:p>
      <text:p text:style-name="P53">Шаг 1: i=0, j=0. Сравниваем s[0]='a' и p[0]='a' – совпадает. Увеличиваем i=1, j=1.<text:line-break/>Шаг 2: i=1, j=1. s[1]='b', p[1]='b' – совпадает. i=2, j=2.</text:p>
      <text:p text:style-name="P53">Шаг 3: i=2, j=2. s[2]='a', p[2]='b' – не совпадает. Так как j&gt;0, берём j = π[1] = 0. i остаётся 2.</text:p>
      <text:p text:style-name="P53">Шаг 4: i=2, j=0. s[2]='a', p[0]='a' – совпадает. i=3, j=1.</text:p>
      <text:p text:style-name="P53"><text:soft-page-break/>Шаг 5: i=3, j=1. s[3]='b', p[1]='b' – совпадает. i=4, j=2.</text:p>
      <text:p text:style-name="P53">Шаг 6: i=4, j=2. s[4]='b', p[2]='b' – совпадает. i=5, j=3.</text:p>
      <text:p text:style-name="P53">Шаг 7: j достигло длины подстроки (3) → найдено вхождение. Начальная позиция = i - m = 5 - 3 = 2 (индекс в строке: 2).</text:p>
      <text:p text:style-name="P49"><text:span text:style-name="T17">Итого: строка просмотрена за один проход, выполнено 6 сравнений.</text:span></text:p>
      <text:p text:style-name="P47"/>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46" loext:marker-style-name="T14"/>
      <text:p text:style-name="P54" loext:marker-style-name="T14"><text:soft-page-break/>Алгоритм Бойера-<text:span text:style-name="T27">Мура</text:span></text:p>
      <text:p text:style-name="P55" loext:marker-style-name="T14"><text:tab/>В этом методе просмотр символов строки выполняется справа налево. Алгоритм использует две эвристики для определения величины сдвига шаблона при возникновении несовпадения:</text:p>
      <text:list text:style-name="L3">
        <text:list-item>
          <text:list>
            <text:list-item>
              <text:p text:style-name="P56" loext:marker-style-name="T14">Эвристика стоп-символа: когда символ строки не совпадает с символом шаблона, шаблон сдвигается так, чтобы последний встреченный стоп-символ в строке совпал с самым правым его вхождением в шаблоне; если такого символа в шаблоне нет, шаблон сдвигается полностью за этот символ.</text:p>
            </text:list-item>
            <text:list-item>
              <text:p text:style-name="P56" loext:marker-style-name="T14">Эвристика совпавшего суффикса: если часть шаблона уже совпала с концом некоторого фрагмента строки, шаблон сдвигается таким образом, чтобы этот совпавший суффикс совместился с предыдущим вхождением такого же суффикса в шаблоне (или с префиксом, если суффикс не повторяется). Выбирается больший из двух возможных сдвигов. Благодаря этому алгоритм часто пропускает большие участки текста.</text:p>
            </text:list-item>
          </text:list>
        </text:list-item>
      </text:list>
      <text:p text:style-name="P55" loext:marker-style-name="T14"><text:tab/>Пусть n – длина строки, m – длина шаблона. Тогда:</text:p>
      <text:p text:style-name="P46" loext:marker-style-name="T14">Худшее время: O(n * m)</text:p>
      <text:p text:style-name="P46" loext:marker-style-name="T14">Среднее время: O(n + m)</text:p>
      <text:p text:style-name="P46" loext:marker-style-name="T14">Лучшее время: O(n / m)</text:p>
      <text:p text:style-name="P46" loext:marker-style-name="T14">Затраты памяти: O(m + алфавит)</text:p>
      <text:p text:style-name="P57" loext:marker-style-name="T14"><text:span text:style-name="T28"><text:tab/>Пример работы алгоритма:</text:span></text:p>
      <text:p text:style-name="P40">Строка: a b a b b a (длина n=6)<text:line-break/>Подстрока: a b b (длина m=3)</text:p>
      <text:p text:style-name="P40">Правило: сравнение идёт справа налево. При несовпадении (стоп-символ) – сдвиг по таблице стоп-символов.<text:line-break/>Таблица стоп-символов для подстроки "abb":</text:p>
      <text:list text:style-name="L4">
        <text:list-item>
          <text:p text:style-name="P58">a → последняя позиция 0</text:p>
        </text:list-item>
        <text:list-item>
          <text:p text:style-name="P58">b → последняя позиция 2</text:p>
        </text:list-item>
        <text:list-item>
          <text:p text:style-name="P58">остальные символы → -1</text:p>
        </text:list-item>
      </text:list>
      <text:p text:style-name="P40"><text:soft-page-break/>Формула сдвига: j - last[стоп_символ], где j – индекс в подстроке (от 0 до m-1), на котором произошло несовпадение.</text:p>
      <text:p text:style-name="P33">Таб<text:span text:style-name="T21">лица</text:span> 3 – пример работы алгоритма Бойера-Мура.</text:p>
      <table:table table:name="Таблица3" table:style-name="Таблица3">
        <table:table-column table:style-name="Таблица3.A"/>
        <table:table-column table:style-name="Таблица3.B"/>
        <table:table-column table:style-name="Таблица3.C"/>
        <table:table-header-rows>
          <table:table-row>
            <table:table-cell table:style-name="Таблица3.A1" office:value-type="string">
              <text:p text:style-name="P51">Ш<text:span text:style-name="T21">аг</text:span></text:p>
            </table:table-cell>
            <table:table-cell table:style-name="Таблица3.A1" office:value-type="string">
              <text:p text:style-name="P51">Строка с отметками</text:p>
            </table:table-cell>
            <table:table-cell table:style-name="Таблица3.C1" office:value-type="string">
              <text:p text:style-name="P51">Пояснение</text:p>
            </table:table-cell>
          </table:table-row>
        </table:table-header-rows>
        <table:table-row>
          <table:table-cell table:style-name="Таблица3.A2" office:value-type="string">
            <text:p text:style-name="P36">0</text:p>
          </table:table-cell>
          <table:table-cell table:style-name="Таблица3.A2" office:value-type="string">
            <text:p text:style-name="P37">a <text:s/>b <text:s/>a <text:s/>b <text:s/>b <text:s/>a</text:p>
          </table:table-cell>
          <table:table-cell table:style-name="Таблица3.C2" office:value-type="string">
            <text:p text:style-name="P37">Исходная строка</text:p>
          </table:table-cell>
        </table:table-row>
        <table:table-row>
          <table:table-cell table:style-name="Таблица3.A2" office:value-type="string">
            <text:p text:style-name="P36">1</text:p>
          </table:table-cell>
          <table:table-cell table:style-name="Таблица3.A2" office:value-type="string">
            <text:p text:style-name="P37">[a <text:s/>b <text:s/>b] a <text:s/>b <text:s/>b <text:s/>a</text:p>
          </table:table-cell>
          <table:table-cell table:style-name="Таблица3.C2" office:value-type="string">
            <text:p text:style-name="P59">Выравниваем подстроку на позицию 0 (начало в квадратных скобках). Начинаем сравнение с последнего символа подстроки (индекс 2, символ b) и символа строки на позиции 2 (символ a).</text:p>
          </table:table-cell>
        </table:table-row>
        <table:table-row table:style-name="Таблица3.4">
          <table:table-cell table:style-name="Таблица3.A2" office:value-type="string">
            <text:p text:style-name="P36">1</text:p>
          </table:table-cell>
          <table:table-cell table:style-name="Таблица3.A2" office:value-type="string">
            <text:p text:style-name="P37">a <text:s/>b [a] b <text:s/>b <text:s/>a</text:p>
          </table:table-cell>
          <table:table-cell table:style-name="Таблица3.C2" office:value-type="string">
            <text:p text:style-name="P60">Сравниваем b (подстрока) и a (строка) – не совпадают. Стоп-символ = a. В подстроке a встречается на позиции 0. Сдвиг = j - last<text:span text:style-name="T29">["a"]</text:span> = 2 - 0 = 2. Переходим к шагу 2.</text:p>
          </table:table-cell>
        </table:table-row>
        <table:table-row>
          <table:table-cell table:style-name="Таблица3.A2" office:value-type="string">
            <text:p text:style-name="P36">2</text:p>
          </table:table-cell>
          <table:table-cell table:style-name="Таблица3.A2" office:value-type="string">
            <text:p text:style-name="P37">a <text:s/>b [a <text:s/>b <text:s/>b] a</text:p>
          </table:table-cell>
          <table:table-cell table:style-name="Таблица3.C2" office:value-type="string">
            <text:p text:style-name="P59">Сдвигаем подстроку на 2 позиции вправо (начало в позиции 2). Сравниваем последний символ подстроки (b) с символом строки на позиции 4 (b).</text:p>
          </table:table-cell>
        </table:table-row>
        <table:table-row>
          <table:table-cell table:style-name="Таблица3.A2" office:value-type="string">
            <text:p text:style-name="P39">3</text:p>
          </table:table-cell>
          <table:table-cell table:style-name="Таблица3.A2" office:value-type="string">
            <text:p text:style-name="P37">a <text:s/>b <text:s/>a <text:s/>b [b] a</text:p>
          </table:table-cell>
          <table:table-cell table:style-name="Таблица3.C2" office:value-type="string">
            <text:p text:style-name="P59">Символы b и b совпадают. Переходим к следующему символу левее (индекс подстроки 1).</text:p>
          </table:table-cell>
        </table:table-row>
        <table:table-row>
          <table:table-cell table:style-name="Таблица3.A2" office:value-type="string">
            <text:p text:style-name="P39">4</text:p>
          </table:table-cell>
          <table:table-cell table:style-name="Таблица3.A2" office:value-type="string">
            <text:p text:style-name="P37">a <text:s/>b <text:s/>a [b] b <text:s/>a</text:p>
          </table:table-cell>
          <table:table-cell table:style-name="Таблица3.C2" office:value-type="string">
            <text:p text:style-name="P59">Сравниваем b (подстрока) и b (строка) – совпадают. Переходим к следующему левому символу (индекс подстроки 0).</text:p>
          </table:table-cell>
        </table:table-row>
        <table:table-row>
          <table:table-cell table:style-name="Таблица3.A2" office:value-type="string">
            <text:p text:style-name="P39">5</text:p>
          </table:table-cell>
          <table:table-cell table:style-name="Таблица3.A2" office:value-type="string">
            <text:p text:style-name="P37">a <text:s/>b [a] b <text:s/>b <text:s/>a</text:p>
          </table:table-cell>
          <table:table-cell table:style-name="Таблица3.C2" office:value-type="string">
            <text:p text:style-name="P59">Сравниваем a (подстрока) и a (строка) – совпадают. Все символы проверены. Нашли полное вхождение подстроки на позиции 2 (начало).</text:p>
          </table:table-cell>
        </table:table-row>
        <table:table-row>
          <table:table-cell table:style-name="Таблица3.A2" office:value-type="string">
            <text:p text:style-name="P36">Итого</text:p>
          </table:table-cell>
          <table:table-cell table:style-name="Таблица3.A2" office:value-type="string">
            <text:p text:style-name="P37"/>
          </table:table-cell>
          <table:table-cell table:style-name="Таблица3.C2" office:value-type="string">
            <text:p text:style-name="P59">2 глобальных сдвига, 4 сравнения символов.</text:p>
          </table:table-cell>
        </table:table-row>
      </table:table>
      <text:p text:style-name="P40"/>
      <text:p text:style-name="P41"><text:tab/>Пошаговое описание:</text:p>
      <text:p text:style-name="P43">Шаг <text:span text:style-name="T29">1</text:span>: Подстрока abb выравнена с началом строки (позиция 0).</text:p>
      <text:p text:style-name="P43">Шаг <text:span text:style-name="T29">2</text:span>: Сравниваем последний символ подстроки (индекс 2, b) с символом строки на позиции 2 (a). Они не совпадают. Стоп-символ a есть в подстроке на позиции 0. Вычисляем сдвиг: 2 - 0 = 2. Переходим к шагу <text:span text:style-name="T29">3</text:span>.</text:p>
      <text:p text:style-name="P43">Шаг <text:span text:style-name="T29">3</text:span>: Сдвигаем подстроку на 2 позиции, теперь начало на позиции 2. Сравниваем последний символ подстроки (b) с символом строки на позиции 4 (b) – совпадает.</text:p>
      <text:p text:style-name="P43"><text:soft-page-break/>Шаг <text:span text:style-name="T29">4</text:span>: Сравниваем предпоследний символ подстроки (b) с символом строки на позиции 3 (b) – совпадает.</text:p>
      <text:p text:style-name="P61">Шаг <text:span text:style-name="T21">5</text:span>: Сравниваем первый символ подстроки (a) с символом строки на позиции 2 (a) – совпадает. Все символы совпали. Вхождение найдено на позиции 2.</text:p>
      <text:p text:style-name="P42">Итого: 2 <text:span text:style-name="T21">выравнивания </text:span>и 4 сравнения.</text:p>
      <text:p text:style-name="Text_20_body"/>
      <text:p text:style-name="P62">Особенности программы</text:p>
      <text:p text:style-name="P63"><text:tab/>Для выполнения <text:span text:style-name="T30">задачи (поиска подстроки) были реализованы 3 алгоритма: метод полного перебора,</text:span><text:span text:style-name="T31"> </text:span><text:span text:style-name="T30">алогритм </text:span><text:span text:style-name="T31">KMP,</text:span><text:span text:style-name="T30"> алгоритм Бойера-Мура и написана программа на языке </text:span><text:span text:style-name="T31">C++.</text:span></text:p>
      <text:p text:style-name="P64"><text:tab/>Запуск был произведён 10000 раз на случайной строке с мощностью в 7 символов. Замерялось время выполнения 10000 запусков, считалось среднее время для каждого алгоритма отдельно, после чего данные записывались в соответствующие текстовые документы.</text:p>
      <text:p text:style-name="P65"/>
      <text:p text:style-name="P66">Результаты работы</text:p>
      <text:p text:style-name="P67"><text:tab/>Замеры алгоритмов производились на строках длинной от 100 до 3000 символов с шагом 100 с подсчётом среднего времени из 10000 запусков для каждого размера. В результате работы программы мы получаем время работы алгоритмов в мс на массиве длинной <text:span text:style-name="T27">n.</text:span></text:p>
      <text:p text:style-name="P67"><text:tab/>На основе полученных данных были построены графики зависимости работы времени алгоритмов от размера строки с помощью скрипта на <text:span text:style-name="T27">python. </text:span></text:p>
      <text:p text:style-name="P68"><draw:frame draw:style-name="fr1" draw:name="Врезка1" text:anchor-type="char" svg:x="0.794cm" svg:y="-0.215cm" svg:width="14.75cm" draw:z-index="1"><draw:text-box fo:min-height="9.156cm"><text:p text:style-name="P69"><draw:frame draw:style-name="fr2" draw:name="Изображение1" text:anchor-type="paragraph" svg:width="14.75cm" style:rel-width="100%" svg:height="9.156cm" style:rel-height="scale" draw:z-index="2"><draw:image xlink:href="Pictures/1000000100000BB80000070834D9C2CB.png" xlink:type="simple" xlink:show="embed" xlink:actuate="onLoad" draw:mime-type="image/png"/></draw:frame>Рисунок <text:sequence text:ref-name="refDrawing0" text:name="Drawing" text:formula="ooow:Drawing+1" style:num-format="1">1</text:sequence>. Общий график зависимости времени работы алгоритмов от длины строки</text:p></draw:text-box></draw:frame><text:soft-page-break/><text:line-break/></text:p>
      <text:p text:style-name="P68"/>
      <text:p text:style-name="P68"><draw:frame draw:style-name="fr1" draw:name="Врезка2" text:anchor-type="char" svg:x="0.563cm" svg:y="0.018cm" svg:width="15.245cm" draw:z-index="3"><draw:text-box fo:min-height="9.289cm"><text:p text:style-name="P69"><draw:frame draw:style-name="fr3" draw:name="Изображение2" text:anchor-type="paragraph" svg:width="15.245cm" style:rel-width="100%" svg:height="9.289cm" style:rel-height="scale" draw:z-index="4"><draw:image xlink:href="Pictures/1000000100000BB80000070857A65D25.png" xlink:type="simple" xlink:show="embed" xlink:actuate="onLoad" draw:mime-type="image/png"/></draw:frame>Рисунок <text:sequence text:ref-name="refDrawing1" text:name="Drawing" text:formula="ooow:Drawing+1" style:num-format="1">2</text:sequence>. График зависимости времени работы алгоритмов от длины строки для KMP и Алгоритма Бойера-Мура</text:p></draw:text-box></draw:frame></text:p>
      <text:p text:style-name="P68"/>
      <text:p text:style-name="P68"><text:soft-page-break/><text:span text:style-name="T32"><text:tab/>В связи с большой разницей во времени работы, был также сделан график без метода полного перебора.</text:span></text:p>
      <text:p text:style-name="P70"><text:tab/>По графикам можно заметить:</text:p>
      <text:list text:style-name="L5">
        <text:list-item>
          <text:list>
            <text:list-item>
              <text:p text:style-name="P71">Все три алгоритма показывают линейный рост времени с увеличением длины строки.</text:p>
            </text:list-item>
          </text:list>
        </text:list-item>
      </text:list>
      <text:list text:style-name="L6">
        <text:list-item>
          <text:list>
            <text:list-item>
              <text:p text:style-name="P72">Прямой перебор работает медленнее всех: при 3000 символах время ~0,17 мс.</text:p>
            </text:list-item>
            <text:list-item>
              <text:p text:style-name="P72">КМП заметно быстрее: ~0,028 мс (примерно в 6 раз быстрее прямого перебора).</text:p>
            </text:list-item>
            <text:list-item>
              <text:p text:style-name="P72">Бойер-Мур самый быстрый: ~0,005 мс (в 35 раз быстрее прямого перебора и в 5,6 раза быстрее КМП).</text:p>
            </text:list-item>
          </text:list>
        </text:list-item>
      </text:list>
      <text:p text:style-name="P70"><text:tab/>Бойер-Мур самый быстрый, потому что сравнивает справа налево и с помощью эвристик может сдвигаться сразу на несколько позиций, пропуская большие участки строки.</text:p>
      <text:p text:style-name="P70"/>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Выводы</text:p>
      <text:p text:style-name="P75"><text:tab/>В ходе выполнения лабораторной работы были изучены, описаны и программно реализованы три алгоритма поиска подстроки: прямой перебор, алгоритм Кнута-Морриса-Пратта и алгоритм Бойера-Мура.</text:p>
      <text:p text:style-name="P75"><text:tab/>Для каждого алгоритма проведены замеры времени выполнения на строках длиной от 100 до 3000 символов. По результатам замеров построены графики зависимости времени работы от длины строки. Анализ графиков показал, что наилучшую производительность демонстрирует алгоритм Бойера-Мура, за ним следует КМП, а наивный алгоритм работает медленнее всего. При длине строки 3000 символов зафиксировано время: 0,170 мс (прямой перебор), 0,028 мс (КМП), 0,004 мс (Бойер-Мур).</text:p>
      <text:p text:style-name="P75"><text:tab/>Полученные зависимости подтверждают теоретические оценки сложности: наивный алгоритм в среднем близок к линейному, КМП гарантирует линейное время, а Бойер-Мур на практике оказывается самым быстрым за счёт эвристик. Построенные графики подтверждают что <text:span text:style-name="T33">зависимость между временем работы алгоритмов и длинной входных данных является полиномиальной.</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17:23:55.958919500</meta:creation-date>
    <dc:date>2026-04-26T18:48:16.154140200</dc:date>
    <meta:editing-duration>PT19M21S</meta:editing-duration>
    <meta:editing-cycles>3</meta:editing-cycles>
    <meta:generator>LibreOffice/26.2.0.3$Windows_X86_64 LibreOffice_project/620$Build-3</meta:generator>
    <meta:document-statistic meta:table-count="3" meta:image-count="2" meta:object-count="0" meta:page-count="12" meta:paragraph-count="237" meta:word-count="1802" meta:character-count="11383" meta:non-whitespace-character-count="9646"/>
  </office:meta>
</office:document-meta>
</file>